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cd5f8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>
      <style:text-properties officeooo:paragraph-rsid="000cd5f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G Aplicado ao BESS (Battery Energy Storage System)</text:h>
      <text:h text:style-name="Heading_20_2" text:outline-level="2">Introdução</text:h>
      <text:p text:style-name="Text_20_body">O conceito de <text:span text:style-name="Strong_20_Emphasis">ESG (Environmental, Social and Governance)</text:span> tem ganhado relevância estratégica em setores ligados à transição energética. Dentro desse contexto, os <text:span text:style-name="Strong_20_Emphasis">Battery Energy Storage Systems (BESS)</text:span> — sistemas de armazenamento de energia por baterias — são considerados uma tecnologia fundamental para aumentar a participação de fontes renováveis como solar e eólica, reduzindo a dependência de combustíveis fósseis e aumentando a estabilidade das redes elétricas. </text:p>
      <text:p text:style-name="Text_20_body">Entretanto, embora o BESS seja frequentemente associado à sustentabilidade, sua análise ESG exige uma avaliação completa do ciclo de vida, incluindo extração de matérias-primas, fabricação, operação, reciclagem e governança corporativa. </text:p>
      <text:p text:style-name="Horizontal_20_Line"/>
      <text:h text:style-name="Heading_20_1" text:outline-level="1">Pilar Ambiental (Environmental)</text:h>
      <text:h text:style-name="Heading_20_2" text:outline-level="2">Benefícios ambientais</text:h>
      <text:p text:style-name="Text_20_body">Os sistemas BESS desempenham um papel essencial na integração de energias renováveis ao sistema elétrico. Como fontes como solar e eólica possuem geração variável, as baterias permitem armazenar energia excedente e disponibilizá-la quando a produção diminui ou a demanda aumenta. Isso reduz desperdícios energéticos e diminui a necessidade de usinas térmicas de apoio. </text:p>
      <text:p text:style-name="Text_20_body">Entre os principais benefícios ambientais estão:</text:p>
      <text:list text:style-name="L1">
        <text:list-item>
          <text:p text:style-name="P3">Redução das emissões de gases de efeito estufa. </text:p>
        </text:list-item>
        <text:list-item>
          <text:p text:style-name="P3">Maior penetração de energias renováveis na matriz energética. </text:p>
        </text:list-item>
        <text:list-item>
          <text:p text:style-name="P3">Menor necessidade de geração baseada em combustíveis fósseis. </text:p>
        </text:list-item>
        <text:list-item>
          <text:p text:style-name="P3">Melhoria da eficiência energética do sistema elétrico. </text:p>
        </text:list-item>
        <text:list-item>
          <text:p text:style-name="P2">Redução de perdas associadas à transmissão de energia. </text:p>
        </text:list-item>
      </text:list>
      <text:h text:style-name="Heading_20_2" text:outline-level="2">Desafios ambientais</text:h>
      <text:p text:style-name="Text_20_body">Apesar dos benefícios, existem impactos relevantes associados à produção das baterias.</text:p>
      <text:p text:style-name="Text_20_body">Os estudos de Avaliação do Ciclo de Vida (Life Cycle Assessment – LCA) indicam que a maior parte dos impactos ambientais ocorre durante a fabricação das baterias, especialmente devido à mineração e ao processamento de materiais críticos como:</text:p>
      <text:list text:style-name="L2">
        <text:list-item>
          <text:p text:style-name="P5">Lítio </text:p>
        </text:list-item>
        <text:list-item>
          <text:p text:style-name="P5">Níquel </text:p>
        </text:list-item>
        <text:list-item>
          <text:p text:style-name="P5">Cobalto </text:p>
        </text:list-item>
        <text:list-item>
          <text:p text:style-name="P5">Grafite </text:p>
        </text:list-item>
        <text:list-item>
          <text:p text:style-name="P4">Manganês </text:p>
        </text:list-item>
      </text:list>
      <text:p text:style-name="Text_20_body"><text:soft-page-break/>Em algumas químicas de baterias de íons de lítio, a fase de fabricação representa entre 60% e 80% do potencial total de aquecimento global associado ao sistema. </text:p>
      <text:p text:style-name="Text_20_body">Outro desafio importante é o descarte inadequado ao final da vida útil, que pode gerar contaminação ambiental e desperdício de materiais valiosos. Por isso, programas de reciclagem e economia circular são considerados fundamentais para melhorar o desempenho ESG do setor. </text:p>
      <text:h text:style-name="Heading_20_2" text:outline-level="2">Indicadores ambientais (KPIs)</text:h>
      <text:p text:style-name="Text_20_body">Exemplos de KPIs ambientais para projetos BESS:</text:p>
      <text:list text:style-name="L3">
        <text:list-item>
          <text:p text:style-name="P7">Toneladas de CO₂ evitadas por ano. </text:p>
        </text:list-item>
        <text:list-item>
          <text:p text:style-name="P7">Percentual de energia renovável integrada à rede. </text:p>
        </text:list-item>
        <text:list-item>
          <text:p text:style-name="P7">Taxa de reciclagem de baterias. </text:p>
        </text:list-item>
        <text:list-item>
          <text:p text:style-name="P7">Consumo de água na fabricação. </text:p>
        </text:list-item>
        <text:list-item>
          <text:p text:style-name="P7">Percentual de materiais reciclados utilizados. </text:p>
        </text:list-item>
        <text:list-item>
          <text:p text:style-name="P6">Pegada de carbono por kWh armazenado. </text:p>
        </text:list-item>
      </text:list>
      <text:p text:style-name="Horizontal_20_Line"/>
      <text:h text:style-name="Heading_20_1" text:outline-level="1">Pilar Social (Social)</text:h>
      <text:h text:style-name="Heading_20_2" text:outline-level="2">Impactos positivos</text:h>
      <text:p text:style-name="Text_20_body">Os projetos BESS podem gerar benefícios sociais importantes:</text:p>
      <text:list text:style-name="L4">
        <text:list-item>
          <text:p text:style-name="P9">Maior confiabilidade do fornecimento de energia. </text:p>
        </text:list-item>
        <text:list-item>
          <text:p text:style-name="P9">Redução de interrupções elétricas. </text:p>
        </text:list-item>
        <text:list-item>
          <text:p text:style-name="P9">Apoio à eletrificação de comunidades remotas. </text:p>
        </text:list-item>
        <text:list-item>
          <text:p text:style-name="P9">Geração de empregos qualificados em engenharia, operação e manutenção. </text:p>
        </text:list-item>
        <text:list-item>
          <text:p text:style-name="P8">Apoio à descarbonização de setores industriais e de transporte. </text:p>
        </text:list-item>
      </text:list>
      <text:p text:style-name="P22">Além disso, sistemas de armazenamento podem aumentar a resiliência energética em situações de emergência ou desastres naturais, permitindo fornecimento contínuo para hospitais, centros de dados e infraestrutura crítica. </text:p>
      <text:h text:style-name="P1" text:outline-level="2">Riscos sociais</text:h>
      <text:p text:style-name="Text_20_body">Os maiores riscos sociais estão ligados à cadeia de suprimentos das baterias.</text:p>
      <text:p text:style-name="Text_20_body">Pesquisas de Social Life Cycle Assessment (S-LCA) identificaram que os principais riscos concentram-se na extração de matérias-primas, especialmente em regiões onde podem existir:</text:p>
      <text:list text:style-name="L5">
        <text:list-item>
          <text:p text:style-name="P11">Condições precárias de trabalho. </text:p>
        </text:list-item>
        <text:list-item>
          <text:p text:style-name="P11">Violações de direitos humanos. </text:p>
        </text:list-item>
        <text:list-item>
          <text:p text:style-name="P11">Trabalho infantil. </text:p>
        </text:list-item>
        <text:list-item>
          <text:p text:style-name="P11">Falta de segurança ocupacional. </text:p>
        </text:list-item>
        <text:list-item>
          <text:p text:style-name="P10">Baixa rastreabilidade dos fornecedores. </text:p>
        </text:list-item>
      </text:list>
      <text:p text:style-name="Text_20_body">Por esse motivo, empresas do setor vêm adotando programas de due diligence, certificação de <text:soft-page-break/>fornecedores e auditorias sociais.</text:p>
      <text:h text:style-name="Heading_20_2" text:outline-level="2">Indicadores sociais (KPIs)</text:h>
      <text:p text:style-name="Text_20_body">Exemplos:</text:p>
      <text:list text:style-name="L6">
        <text:list-item>
          <text:p text:style-name="P13">Número de empregos gerados. </text:p>
        </text:list-item>
        <text:list-item>
          <text:p text:style-name="P13">Taxa de acidentes de trabalho. </text:p>
        </text:list-item>
        <text:list-item>
          <text:p text:style-name="P13">Horas de treinamento em segurança. </text:p>
        </text:list-item>
        <text:list-item>
          <text:p text:style-name="P13">Percentual de fornecedores auditados. </text:p>
        </text:list-item>
        <text:list-item>
          <text:p text:style-name="P13">Diversidade da força de trabalho. </text:p>
        </text:list-item>
        <text:list-item>
          <text:p text:style-name="P12">Investimentos em comunidades locais. </text:p>
        </text:list-item>
      </text:list>
      <text:p text:style-name="Horizontal_20_Line"/>
      <text:h text:style-name="Heading_20_1" text:outline-level="1">Pilar de Governança (Governance)</text:h>
      <text:h text:style-name="Heading_20_2" text:outline-level="2">Boas práticas de governança</text:h>
      <text:p text:style-name="Text_20_body">A governança em projetos BESS envolve garantir transparência, gestão de riscos e conformidade regulatória.</text:p>
      <text:p text:style-name="Text_20_body">As principais práticas incluem:</text:p>
      <text:list text:style-name="L7">
        <text:list-item>
          <text:p text:style-name="P15">Divulgação transparente de dados ESG. </text:p>
        </text:list-item>
        <text:list-item>
          <text:p text:style-name="P15">Auditorias independentes. </text:p>
        </text:list-item>
        <text:list-item>
          <text:p text:style-name="P15">Gestão de riscos operacionais. </text:p>
        </text:list-item>
        <text:list-item>
          <text:p text:style-name="P15">Políticas anticorrupção. </text:p>
        </text:list-item>
        <text:list-item>
          <text:p text:style-name="P15">Rastreabilidade da cadeia de suprimentos. </text:p>
        </text:list-item>
        <text:list-item>
          <text:p text:style-name="P14">Compliance regulatório. </text:p>
        </text:list-item>
      </text:list>
      <text:h text:style-name="Heading_20_2" text:outline-level="2">Cibersegurança como tema ESG</text:h>
      <text:p text:style-name="Text_20_body">Um aspecto que ganhou destaque recentemente é a cibersegurança.</text:p>
      <text:p text:style-name="Text_20_body">Os sistemas BESS modernos são altamente digitalizados e frequentemente conectados a:</text:p>
      <text:list text:style-name="L8">
        <text:list-item>
          <text:p text:style-name="P17">Plataformas em nuvem. </text:p>
        </text:list-item>
        <text:list-item>
          <text:p text:style-name="P17">Sistemas SCADA. </text:p>
        </text:list-item>
        <text:list-item>
          <text:p text:style-name="P17">Softwares de gerenciamento de energia. </text:p>
        </text:list-item>
        <text:list-item>
          <text:p text:style-name="P16">Redes inteligentes (smart grids). </text:p>
        </text:list-item>
      </text:list>
      <text:p text:style-name="Text_20_body">Essa conectividade cria novos riscos de ataques cibernéticos, que podem comprometer a estabilidade do sistema elétrico. Por isso, a cibersegurança passou a ser considerada um tema relevante dentro da governança ESG para infraestrutura energética. </text:p>
      <text:p text:style-name="Text_20_body"/>
      <text:h text:style-name="Heading_20_2" text:outline-level="2"><text:soft-page-break/>Indicadores de governança (KPIs)</text:h>
      <text:p text:style-name="Text_20_body">Exemplos:</text:p>
      <text:list text:style-name="L9">
        <text:list-item>
          <text:p text:style-name="P19">Número de auditorias ESG realizadas. </text:p>
        </text:list-item>
        <text:list-item>
          <text:p text:style-name="P19">Percentual de fornecedores rastreados. </text:p>
        </text:list-item>
        <text:list-item>
          <text:p text:style-name="P19">Incidentes de compliance. </text:p>
        </text:list-item>
        <text:list-item>
          <text:p text:style-name="P19">Incidentes de cibersegurança. </text:p>
        </text:list-item>
        <text:list-item>
          <text:p text:style-name="P19">Frequência de divulgação de relatórios ESG. </text:p>
        </text:list-item>
        <text:list-item>
          <text:p text:style-name="P18">Percentual de metas ESG atingidas. </text:p>
        </text:list-item>
      </text:list>
      <text:p text:style-name="Horizontal_20_Line"/>
      <text:h text:style-name="Heading_20_1" text:outline-level="1">Principais Desafios ESG para o Futuro do BESS</text:h>
      <text:list text:style-name="L10">
        <text:list-item>
          <text:p text:style-name="P21">Reduzir a dependência de minerais críticos. </text:p>
        </text:list-item>
        <text:list-item>
          <text:p text:style-name="P21">Aumentar as taxas de reciclagem de baterias. </text:p>
        </text:list-item>
        <text:list-item>
          <text:p text:style-name="P21">Desenvolver cadeias de suprimentos mais éticas e rastreáveis. </text:p>
        </text:list-item>
        <text:list-item>
          <text:p text:style-name="P21">Melhorar a segurança operacional e cibernética. </text:p>
        </text:list-item>
        <text:list-item>
          <text:p text:style-name="P21">Criar regulamentações específicas para armazenamento de energia. </text:p>
        </text:list-item>
        <text:list-item>
          <text:p text:style-name="P20">Diminuir a pegada de carbono da fabricação das baterias. </text:p>
        </text:list-item>
      </text:list>
      <text:p text:style-name="Horizontal_20_Line"/>
      <text:h text:style-name="Heading_20_1" text:outline-level="1">Conclusão</text:h>
      <text:p text:style-name="Text_20_body">A aplicação do ESG ao BESS demonstra que os sistemas de armazenamento por baterias são fundamentais para a transição energética e para o avanço de uma economia de baixo carbono. Entretanto, sua sustentabilidade não pode ser avaliada apenas pelos benefícios operacionais. É necessário considerar todo o ciclo de vida das baterias, os impactos sociais da cadeia de suprimentos e a governança dos projetos.</text:p>
      <text:p text:style-name="Text_20_body">Empresas que adotam uma estratégia ESG robusta para BESS tendem a reduzir riscos regulatórios, melhorar sua reputação perante investidores e contribuir de forma mais efetiva para os Objetivos de Desenvolvimento Sustentável (ODS) e para a descarbonização do setor energético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9T17:08:25.899891846</dc:date>
    <meta:editing-duration>PT2M36S</meta:editing-duration>
    <meta:editing-cycles>1</meta:editing-cycles>
    <meta:document-statistic meta:table-count="0" meta:image-count="0" meta:object-count="0" meta:page-count="4" meta:paragraph-count="93" meta:word-count="908" meta:character-count="6294" meta:non-whitespace-character-count="5470"/>
    <meta:generator>LibreOffice/24.2.7.2$Linux_X86_64 LibreOffice_project/420$Build-2</meta:generator>
  </office:meta>
</office:document-meta>
</file>